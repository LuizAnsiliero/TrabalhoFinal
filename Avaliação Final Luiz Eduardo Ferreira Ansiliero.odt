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rial" svg:font-family="A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arial" fo:font-weight="bold" officeooo:rsid="0000aef4" officeooo:paragraph-rsid="0000aef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arial" fo:font-weight="normal" officeooo:rsid="0000aef4" officeooo:paragraph-rsid="0000aef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arial" fo:font-weight="normal" officeooo:rsid="0000aef4" officeooo:paragraph-rsid="0000faab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arial" fo:font-weight="bold" officeooo:rsid="0004347e" officeooo:paragraph-rsid="0004347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arial" fo:font-weight="bold" officeooo:rsid="0004347e" officeooo:paragraph-rsid="0004347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arial" fo:font-weight="bold" officeooo:rsid="0005b9d3" officeooo:paragraph-rsid="0005b9d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arial" fo:font-weight="normal" officeooo:rsid="0000aef4" officeooo:paragraph-rsid="0000aef4" style:font-weight-asian="normal" style:font-weight-complex="normal"/>
    </style:style>
    <style:style style:name="T1" style:family="text">
      <style:text-properties officeooo:rsid="0000faab"/>
    </style:style>
    <style:style style:name="T2" style:family="text">
      <style:text-properties officeooo:rsid="00043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TECNOLÓGICA FEDERAL DO PARANÁ</text:p>
      <text:p text:style-name="P1"/>
      <text:p text:style-name="P1"/>
      <text:p text:style-name="P1"/>
      <text:p text:style-name="P4">LUIZ EDUARDO FERREIRA ANSILIE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TRABALHO FINA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UARAPUAVA-PR</text:p>
      <text:p text:style-name="P1">2026</text:p>
      <text:p text:style-name="P3"><text:soft-page-break/>Universidade Tecnológia Federal do Paraná</text:p>
      <text:p text:style-name="P3">Curso de Sistemas para Internet</text:p>
      <text:p text:style-name="P3">Disciplina de Fundamentos de Sistemas computacionais</text:p>
      <text:p text:style-name="P3">1<text:span text:style-name="T1">°</text:span> Semestre de 2026</text:p>
      <text:p text:style-name="P3"/>
      <text:p text:style-name="P5">Trabalho Final</text:p>
      <text:p text:style-name="P2"/>
      <text:p text:style-name="P6">Resumo da parte teórica:</text:p>
      <text:p text:style-name="P6"/>
      <text:p text:style-name="P2"/>
      <text:p text:style-name="P2"/>
      <text:p text:style-name="P6">Exercício A:</text:p>
      <text:p text:style-name="P6">1:</text:p>
      <text:p text:style-name="P6">2:</text:p>
      <text:p text:style-name="P6">3:</text:p>
      <text:p text:style-name="P6">Exercício B:</text:p>
      <text:p text:style-name="P6">1:</text:p>
      <text:p text:style-name="P6">2:</text:p>
      <text:p text:style-name="P6">3:</text:p>
      <text:p text:style-name="P6">Exercício C:</text:p>
      <text:p text:style-name="P6">1:</text:p>
      <text:p text:style-name="P6">2:</text:p>
      <text:p text:style-name="P6">3:</text:p>
      <text:p text:style-name="P6">Exercício D:</text:p>
      <text:p text:style-name="P6">1:</text:p>
      <text:p text:style-name="P6">2:</text:p>
      <text:p text:style-name="P6">3:</text:p>
      <text:p text:style-name="P6">Exercício E:</text:p>
      <text:p text:style-name="P6">1:</text:p>
      <text:p text:style-name="P6">2:</text:p>
      <text:p text:style-name="P6">3:</text:p>
      <text:p text:style-name="P6">Exercício F:</text:p>
      <text:p text:style-name="P6">1:</text:p>
      <text:p text:style-name="P6">2:</text:p>
      <text:p text:style-name="P6">3:</text:p>
      <text:p text:style-name="P6">Exercício G:</text:p>
      <text:p text:style-name="P6">1:</text:p>
      <text:p text:style-name="P6">2:</text:p>
      <text:p text:style-name="P6">3:</text:p>
      <text:p text:style-name="P6">Exercício H:</text:p>
      <text:p text:style-name="P6">1:</text:p>
      <text:p text:style-name="P6">2:</text:p>
      <text:p text:style-name="P6"><text:soft-page-break/>3:</text:p>
      <text:p text:style-name="P6"/>
      <text:p text:style-name="P6"/>
      <text:p text:style-name="P6"/>
      <text:p text:style-name="P6">Exercício I:</text:p>
      <text:p text:style-name="P6">1:</text:p>
      <text:p text:style-name="P6">2:</text:p>
      <text:p text:style-name="P6">3:</text:p>
      <text:p text:style-name="P6">Exercício J:</text:p>
      <text:p text:style-name="P6">1:</text:p>
      <text:p text:style-name="P6">2:</text:p>
      <text:p text:style-name="P6">3:</text:p>
      <text:p text:style-name="P6">Exercício K:</text:p>
      <text:p text:style-name="P6">1:</text:p>
      <text:p text:style-name="P6">2:</text:p>
      <text:p text:style-name="P6">3:</text:p>
      <text:p text:style-name="P6">Exercício L:</text:p>
      <text:p text:style-name="P6">1:</text:p>
      <text:p text:style-name="P6">2:</text:p>
      <text:p text:style-name="P6">3:</text:p>
      <text:p text:style-name="P6">Exercício M:</text:p>
      <text:p text:style-name="P6">1:</text:p>
      <text:p text:style-name="P6">2:</text:p>
      <text:p text:style-name="P6">3: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rial" svg:font-family="A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9:32:02.024740448</meta:creation-date>
    <meta:generator>LibreOffice/24.2.7.2$Linux_X86_64 LibreOffice_project/420$Build-2</meta:generator>
    <meta:print-date>2026-03-17T21:47:47.391978259</meta:print-date>
    <meta:printed-by>Arquivos PDF</meta:printed-by>
    <dc:date>2026-06-10T19:12:54.941148339</dc:date>
    <meta:editing-duration>PT4M11S</meta:editing-duration>
    <meta:editing-cycles>3</meta:editing-cycles>
    <meta:document-statistic meta:table-count="0" meta:image-count="0" meta:object-count="0" meta:page-count="3" meta:paragraph-count="63" meta:word-count="104" meta:character-count="519" meta:non-whitespace-character-count="478"/>
  </office:meta>
</office:document-meta>
</file>